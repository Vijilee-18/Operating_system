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06CBB1036C1048CC248.png" manifest:media-type="image/png"/>
  <manifest:file-entry manifest:full-path="Pictures/100000010000027F0000002AF5A9A599700ECAA1.png" manifest:media-type="image/png"/>
  <manifest:file-entry manifest:full-path="Pictures/100000010000035C0000004F64ED63E5E77B7BDA.png" manifest:media-type="image/png"/>
  <manifest:file-entry manifest:full-path="Pictures/10000001000003580000002CEE74225582C2568B.png" manifest:media-type="image/png"/>
  <manifest:file-entry manifest:full-path="Pictures/10000001000005030000002B49811AF2D7D6AF1B.png" manifest:media-type="image/png"/>
  <manifest:file-entry manifest:full-path="Pictures/10000001000002AF0000003CF95F2303FB93D8FA.png" manifest:media-type="image/png"/>
  <manifest:file-entry manifest:full-path="Pictures/100000010000029A0000002D63B837131043E0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e3bcd" officeooo:paragraph-rsid="000e3bc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fd428" officeooo:paragraph-rsid="000fd42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16a07" officeooo:paragraph-rsid="00116a0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35b1c" officeooo:paragraph-rsid="00135b1c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e3bcd" officeooo:paragraph-rsid="000e3bcd"/>
    </style:style>
    <style:style style:name="P7" style:family="paragraph" style:parent-style-name="Standard">
      <style:text-properties officeooo:rsid="000fd428" officeooo:paragraph-rsid="000fd428"/>
    </style:style>
    <style:style style:name="P8" style:family="paragraph" style:parent-style-name="Standard">
      <style:text-properties fo:font-weight="normal" officeooo:rsid="00116a07" officeooo:paragraph-rsid="00116a07" style:font-weight-asian="normal" style:font-weight-complex="normal"/>
    </style:style>
    <style:style style:name="P9" style:family="paragraph" style:parent-style-name="Standard">
      <style:text-properties fo:font-weight="normal" officeooo:rsid="00135b1c" officeooo:paragraph-rsid="00135b1c" style:font-weight-asian="normal" style:font-weight-complex="normal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e3bcd" officeooo:paragraph-rsid="000e3bc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6a07" officeooo:paragraph-rsid="00116a0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officeooo:rsid="000fd428" officeooo:paragraph-rsid="000fd428" style:font-size-asian="12pt" style:font-size-complex="12pt"/>
    </style:style>
    <style:style style:name="P14" style:family="paragraph" style:parent-style-name="Standard">
      <style:text-properties fo:font-size="12pt" fo:font-weight="bold" officeooo:rsid="00116a07" officeooo:paragraph-rsid="00116a07" style:font-size-asian="12pt" style:font-weight-asian="bold" style:font-size-complex="12pt" style:font-weight-complex="bold"/>
    </style:style>
    <style:style style:name="T1" style:family="text">
      <style:text-properties officeooo:rsid="000e3bc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/<text:span text:style-name="T1">pros file system commands</text:span></text:p>
      <text:p text:style-name="P1"/>
      <text:p text:style-name="P1"/>
      <text:p text:style-name="P2">a) Number of CPU Cores </text:p>
      <text:p text:style-name="P2"><text:s text:c="5"/></text:p>
      <text:p text:style-name="P11">Command: <text:s text:c="2"/>grep -c ^processor /proc/cpuinfo</text:p>
      <text:p text:style-name="P11">Sample Output:</text:p>
      <text:p text:style-name="Standard"><draw:frame draw:style-name="fr2" draw:name="Image1" text:anchor-type="char" svg:x="0.106cm" svg:y="0.347cm" svg:width="17cm" svg:height="1.148cm" draw:z-index="0"><draw:image xlink:href="Pictures/100000010000029A0000002D63B837131043E033.png" xlink:type="simple" xlink:show="embed" xlink:actuate="onLoad" draw:mime-type="image/png"/></draw:frame><text:s text:c="24"/></text:p>
      <text:p text:style-name="P2">b) Total Memory and Fraction of Free Memory</text:p>
      <text:p text:style-name="P6"/>
      <text:p text:style-name="P6">Command : grep -E “MemTotal|MemFree” /proc/meminfo</text:p>
      <text:p text:style-name="P6"/>
      <text:p text:style-name="P6">Sample Output:</text:p>
      <text:p text:style-name="P6"/>
      <text:p text:style-name="P6"><draw:frame draw:style-name="fr3" draw:name="Image2" text:anchor-type="char" svg:width="17cm" svg:height="1.483cm" draw:z-index="1"><draw:image xlink:href="Pictures/10000001000002AF0000003CF95F2303FB93D8FA.png" xlink:type="simple" xlink:show="embed" xlink:actuate="onLoad" draw:mime-type="image/png"/></draw:frame></text:p>
      <text:p text:style-name="P7">To Calculate the Fraction of free memory:</text:p>
      <text:p text:style-name="P7"/>
      <text:p text:style-name="P7">Command : <text:span text:style-name="T6">awk '/MemTotal/ {total=$2} /MemFree/ {free=$2} END {print "Free Fraction = " free/total}' /proc/meminfo</text:span></text:p>
      <text:p text:style-name="P7"><text:span text:style-name="T3"/></text:p>
      <text:p text:style-name="P7"><text:span text:style-name="T3">Sample Output:</text:span></text:p>
      <text:p text:style-name="P7"><draw:frame draw:style-name="fr4" draw:name="Image3" text:anchor-type="char" svg:width="17cm" svg:height="1.004cm" draw:z-index="2"><draw:image xlink:href="Pictures/10000001000005030000002B49811AF2D7D6AF1B.png" xlink:type="simple" xlink:show="embed" xlink:actuate="onLoad" draw:mime-type="image/png"/></draw:frame><text:span text:style-name="T3"/></text:p>
      <text:p text:style-name="P3">c) Number of processes Currently running:</text:p>
      <text:p text:style-name="P7"><text:span text:style-name="T3"/></text:p>
      <text:p text:style-name="P13">Command: ps -e --no-headers | wc -l </text:p>
      <text:p text:style-name="P13"/>
      <text:p text:style-name="P13">Sample output:</text:p>
      <text:p text:style-name="P7"><text:span text:style-name="T3"/></text:p>
      <text:p text:style-name="P7"><draw:frame draw:style-name="fr3" draw:name="Image4" text:anchor-type="char" svg:width="17cm" svg:height="0.873cm" draw:z-index="3"><draw:image xlink:href="Pictures/10000001000003580000002CEE74225582C2568B.png" xlink:type="simple" xlink:show="embed" xlink:actuate="onLoad" draw:mime-type="image/png"/></draw:frame><text:span text:style-name="T3"/></text:p>
      <text:p text:style-name="P4">d) No of Processes in running and Blocked</text:p>
      <text:p text:style-name="P14"/>
      <text:p text:style-name="P12">Command : </text:p>
      <text:p text:style-name="P12"><text:span text:style-name="T7">grep "procs_running" /proc/stat</text:span></text:p>
      <text:p text:style-name="P12"><text:span text:style-name="T7">grep "procs_blocked" /proc/stat</text:span></text:p>
      <text:p text:style-name="P8"><text:span text:style-name="T4"/></text:p>
      <text:p text:style-name="P12">Sample output<draw:frame draw:style-name="fr2" draw:name="Image5" text:anchor-type="char" svg:x="-0.185cm" svg:y="1.296cm" svg:width="17cm" svg:height="1.561cm" draw:z-index="4"><draw:image xlink:href="Pictures/100000010000035C0000004F64ED63E5E77B7BDA.png" xlink:type="simple" xlink:show="embed" xlink:actuate="onLoad" draw:mime-type="image/png"/></draw:frame>:</text:p>
      <text:p text:style-name="P8"><text:span text:style-name="T5"/></text:p>
      <text:p text:style-name="P8"><text:soft-page-break/><text:span text:style-name="T5"/></text:p>
      <text:p text:style-name="P8"><text:span text:style-name="T5"/></text:p>
      <text:p text:style-name="P4">e) No. Of process forked:</text:p>
      <text:p text:style-name="P12">command: grep “processes” /proc/stat</text:p>
      <text:p text:style-name="P9"/>
      <text:p text:style-name="P9"><draw:frame draw:style-name="fr1" draw:name="Image6" text:anchor-type="char" svg:width="16.907cm" svg:height="1.111cm" draw:z-index="5"><draw:image xlink:href="Pictures/100000010000027F0000002AF5A9A599700ECAA1.png" xlink:type="simple" xlink:show="embed" xlink:actuate="onLoad" draw:mime-type="image/png"/></draw:frame><text:s text:c="3"/></text:p>
      <text:p text:style-name="P5">f) No. Of Context Switches:</text:p>
      <text:p text:style-name="P9"/>
      <text:p text:style-name="P9">Command: cat /proc/2310/status | grep ctxt</text:p>
      <text:p text:style-name="P9"/>
      <text:p text:style-name="P9"><draw:frame draw:style-name="fr1" draw:name="Image7" text:anchor-type="char" svg:width="16.986cm" svg:height="2.858cm" draw:z-index="6"><draw:image xlink:href="Pictures/10000001000002820000006CBB1036C1048CC248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1:03:48.588776537</meta:creation-date>
    <dc:date>2026-01-19T11:43:39.751580764</dc:date>
    <meta:editing-duration>PT9M</meta:editing-duration>
    <meta:editing-cycles>1</meta:editing-cycles>
    <meta:document-statistic meta:table-count="0" meta:image-count="7" meta:object-count="0" meta:page-count="2" meta:paragraph-count="26" meta:word-count="110" meta:character-count="762" meta:non-whitespace-character-count="637"/>
    <meta:generator>LibreOffice/7.3.7.2$Linux_X86_64 LibreOffice_project/30$Build-2</meta:generator>
  </office:meta>
</office:document-meta>
</file>